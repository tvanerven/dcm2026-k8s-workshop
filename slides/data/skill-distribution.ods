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3.056cm" svg:y="10.732cm">
            <draw:object draw:notify-on-update-of-ranges="Tabelle1.B18:Tabelle1.I18 Tabelle1.A19:Tabelle1.A19 Tabelle1.B19:Tabelle1.I19 Tabelle1.A20:Tabelle1.A20 Tabelle1.B20:Tabelle1.I20 Tabelle1.A21:Tabelle1.A21 Tabelle1.B21:Tabelle1.I21 Tabelle1.A22:Tabelle1.A22 Tabelle1.B22:Tabelle1.I22 Tabelle1.A23:Tabelle1.A23 Tabelle1.B23:Tabelle1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061cm" svg:height="12.98cm" svg:x="3.056cm" svg:y="10.732cm">
            <draw:object draw:notify-on-update-of-ranges="Tabelle1.B18:Tabelle1.I18 Tabelle1.A19:Tabelle1.A19 Tabelle1.B19:Tabelle1.I19 Tabelle1.A20:Tabelle1.A20 Tabelle1.B20:Tabelle1.I20 Tabelle1.A21:Tabelle1.A21 Tabelle1.B21:Tabelle1.I21 Tabelle1.A22:Tabelle1.A22 Tabelle1.B22:Tabelle1.I22 Tabelle1.A23:Tabelle1.A23 Tabelle1.B23:Tabelle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kill Distribution among Workshop Participan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0=Never heard, 1=Aware, 2=Barely, 3=Regular, 4=Extens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cker</text:p>
          </table:table-cell>
          <table:table-cell office:value-type="string" calcext:value-type="string">
            <text:p>Compose</text:p>
          </table:table-cell>
          <table:table-cell office:value-type="string" calcext:value-type="string">
            <text:p>K8s (Use)</text:p>
          </table:table-cell>
          <table:table-cell office:value-type="string" calcext:value-type="string">
            <text:p>K8s (SysAdm)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itOps</text:p>
          </table:table-cell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ocker</text:p>
          </table:table-cell>
          <table:table-cell office:value-type="string" calcext:value-type="string">
            <text:p>Compose</text:p>
          </table:table-cell>
          <table:table-cell office:value-type="string" calcext:value-type="string">
            <text:p>K8s (Use)</text:p>
          </table:table-cell>
          <table:table-cell office:value-type="string" calcext:value-type="string">
            <text:p>K8s (SysAdm)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itOps</text:p>
          </table:table-cell>
        </table:table-row>
        <table:table-row table:style-name="ro1">
          <table:table-cell office:value-type="string" calcext:value-type="string">
            <text:p>Never heard of it</text:p>
          </table:table-cell>
          <table:table-cell table:formula="of:=COUNTIF([.B$5:.B$15];0)" office:value-type="float" office:value="0" calcext:value-type="float">
            <text:p>0</text:p>
          </table:table-cell>
          <table:table-cell table:formula="of:=COUNTIF([.C$5:.C$15];0)" office:value-type="float" office:value="0" calcext:value-type="float">
            <text:p>0</text:p>
          </table:table-cell>
          <table:table-cell table:formula="of:=COUNTIF([.D$5:.D$15];0)" office:value-type="float" office:value="0" calcext:value-type="float">
            <text:p>0</text:p>
          </table:table-cell>
          <table:table-cell table:formula="of:=COUNTIF([.E$5:.E$15];0)" office:value-type="float" office:value="1" calcext:value-type="float">
            <text:p>1</text:p>
          </table:table-cell>
          <table:table-cell table:formula="of:=COUNTIF([.F$5:.F$15];0)" office:value-type="float" office:value="0" calcext:value-type="float">
            <text:p>0</text:p>
          </table:table-cell>
          <table:table-cell table:formula="of:=COUNTIF([.G$5:.G$15];0)" office:value-type="float" office:value="1" calcext:value-type="float">
            <text:p>1</text:p>
          </table:table-cell>
          <table:table-cell table:formula="of:=COUNTIF([.H$5:.H$15];0)" office:value-type="float" office:value="3" calcext:value-type="float">
            <text:p>3</text:p>
          </table:table-cell>
          <table:table-cell table:formula="of:=COUNTIF([.I$5:.I$15]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ware, but no XP</text:p>
          </table:table-cell>
          <table:table-cell table:formula="of:=COUNTIF([.B$5:.B$15];1)" office:value-type="float" office:value="1" calcext:value-type="float">
            <text:p>1</text:p>
          </table:table-cell>
          <table:table-cell table:formula="of:=COUNTIF([.C$5:.C$15];1)" office:value-type="float" office:value="1" calcext:value-type="float">
            <text:p>1</text:p>
          </table:table-cell>
          <table:table-cell table:formula="of:=COUNTIF([.D$5:.D$15];1)" office:value-type="float" office:value="7" calcext:value-type="float">
            <text:p>7</text:p>
          </table:table-cell>
          <table:table-cell table:formula="of:=COUNTIF([.E$5:.E$15];1)" office:value-type="float" office:value="8" calcext:value-type="float">
            <text:p>8</text:p>
          </table:table-cell>
          <table:table-cell table:formula="of:=COUNTIF([.F$5:.F$15];1)" office:value-type="float" office:value="1" calcext:value-type="float">
            <text:p>1</text:p>
          </table:table-cell>
          <table:table-cell table:formula="of:=COUNTIF([.G$5:.G$15];1)" office:value-type="float" office:value="4" calcext:value-type="float">
            <text:p>4</text:p>
          </table:table-cell>
          <table:table-cell table:formula="of:=COUNTIF([.H$5:.H$15];1)" office:value-type="float" office:value="7" calcext:value-type="float">
            <text:p>7</text:p>
          </table:table-cell>
          <table:table-cell table:formula="of:=COUNTIF([.I$5:.I$15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ely use it</text:p>
          </table:table-cell>
          <table:table-cell table:formula="of:=COUNTIF([.B$5:.B$15];2)" office:value-type="float" office:value="2" calcext:value-type="float">
            <text:p>2</text:p>
          </table:table-cell>
          <table:table-cell table:formula="of:=COUNTIF([.C$5:.C$15];2)" office:value-type="float" office:value="2" calcext:value-type="float">
            <text:p>2</text:p>
          </table:table-cell>
          <table:table-cell table:formula="of:=COUNTIF([.D$5:.D$15];2)" office:value-type="float" office:value="2" calcext:value-type="float">
            <text:p>2</text:p>
          </table:table-cell>
          <table:table-cell table:formula="of:=COUNTIF([.E$5:.E$15];2)" office:value-type="float" office:value="1" calcext:value-type="float">
            <text:p>1</text:p>
          </table:table-cell>
          <table:table-cell table:formula="of:=COUNTIF([.F$5:.F$15];2)" office:value-type="float" office:value="0" calcext:value-type="float">
            <text:p>0</text:p>
          </table:table-cell>
          <table:table-cell table:formula="of:=COUNTIF([.G$5:.G$15];2)" office:value-type="float" office:value="1" calcext:value-type="float">
            <text:p>1</text:p>
          </table:table-cell>
          <table:table-cell table:formula="of:=COUNTIF([.H$5:.H$15];2)" office:value-type="float" office:value="0" calcext:value-type="float">
            <text:p>0</text:p>
          </table:table-cell>
          <table:table-cell table:formula="of:=COUNTIF([.I$5:.I$15];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gular user</text:p>
          </table:table-cell>
          <table:table-cell table:formula="of:=COUNTIF([.B$5:.B$15];3)" office:value-type="float" office:value="5" calcext:value-type="float">
            <text:p>5</text:p>
          </table:table-cell>
          <table:table-cell table:formula="of:=COUNTIF([.C$5:.C$15];3)" office:value-type="float" office:value="5" calcext:value-type="float">
            <text:p>5</text:p>
          </table:table-cell>
          <table:table-cell table:formula="of:=COUNTIF([.D$5:.D$15];3)" office:value-type="float" office:value="1" calcext:value-type="float">
            <text:p>1</text:p>
          </table:table-cell>
          <table:table-cell table:formula="of:=COUNTIF([.E$5:.E$15];3)" office:value-type="float" office:value="1" calcext:value-type="float">
            <text:p>1</text:p>
          </table:table-cell>
          <table:table-cell table:formula="of:=COUNTIF([.F$5:.F$15];3)" office:value-type="float" office:value="4" calcext:value-type="float">
            <text:p>4</text:p>
          </table:table-cell>
          <table:table-cell table:formula="of:=COUNTIF([.G$5:.G$15];3)" office:value-type="float" office:value="1" calcext:value-type="float">
            <text:p>1</text:p>
          </table:table-cell>
          <table:table-cell table:formula="of:=COUNTIF([.H$5:.H$15];3)" office:value-type="float" office:value="0" calcext:value-type="float">
            <text:p>0</text:p>
          </table:table-cell>
          <table:table-cell table:formula="of:=COUNTIF([.I$5:.I$15];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sive level</text:p>
          </table:table-cell>
          <table:table-cell table:formula="of:=COUNTIF([.B$5:.B$15];4)" office:value-type="float" office:value="3" calcext:value-type="float">
            <text:p>3</text:p>
          </table:table-cell>
          <table:table-cell table:formula="of:=COUNTIF([.C$5:.C$15];4)" office:value-type="float" office:value="3" calcext:value-type="float">
            <text:p>3</text:p>
          </table:table-cell>
          <table:table-cell table:formula="of:=COUNTIF([.D$5:.D$15];4)" office:value-type="float" office:value="1" calcext:value-type="float">
            <text:p>1</text:p>
          </table:table-cell>
          <table:table-cell table:formula="of:=COUNTIF([.E$5:.E$15];4)" office:value-type="float" office:value="0" calcext:value-type="float">
            <text:p>0</text:p>
          </table:table-cell>
          <table:table-cell table:formula="of:=COUNTIF([.F$5:.F$15];4)" office:value-type="float" office:value="6" calcext:value-type="float">
            <text:p>6</text:p>
          </table:table-cell>
          <table:table-cell table:formula="of:=COUNTIF([.G$5:.G$15];4)" office:value-type="float" office:value="4" calcext:value-type="float">
            <text:p>4</text:p>
          </table:table-cell>
          <table:table-cell table:formula="of:=COUNTIF([.H$5:.H$15];4)" office:value-type="float" office:value="1" calcext:value-type="float">
            <text:p>1</text:p>
          </table:table-cell>
          <table:table-cell table:formula="of:=COUNTIF([.I$5:.I$15];4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.00.0000</text:date>, <text:time style:data-style-name="N2" text:time-value="18:20:09.22242708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er Bertuch</meta:initial-creator>
    <meta:creation-date>2026-05-09T18:00:56.661811957</meta:creation-date>
    <dc:date>2026-05-09T18:23:05.083855295</dc:date>
    <dc:creator>Oliver Bertuch</dc:creator>
    <meta:editing-duration>PT9M53S</meta:editing-duration>
    <meta:editing-cycles>4</meta:editing-cycles>
    <meta:generator>LibreOffice/25.8.6.2$Linux_X86_64 LibreOffice_project/580$Build-2</meta:generator>
    <meta:document-statistic meta:table-count="1" meta:cell-count="15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566cm" svg:y="3.207cm" style:legend-expansion="high" chart:style-name="ch2"/>
        <chart:plot-area chart:style-name="ch3" svg:x="1.33cm" svg:y="0.18cm" svg:width="10.917cm" svg:height="7.664cm">
          <chart:coordinate-region svg:x="3.779cm" svg:y="1.404cm" svg:width="7.636cm" svg:height="6.44cm"/>
          <chart:axis chart:dimension="x" chart:name="primary-x" chart:style-name="ch4" chartooo:axis-type="auto">
            <chartooo:date-scale/>
            <chart:title svg:x="0.451cm" svg:y="5.163cm" chart:style-name="ch5">
              <text:p><text:span text:style-name="T1">Technical Skills</text:span></text:p>
            </chart:title>
            <chart:categories table:cell-range-address="Tabelle1.B18:Tabelle1.I18"/>
          </chart:axis>
          <chart:axis chart:dimension="y" chart:name="primary-y" chart:style-name="ch6">
            <chart:title svg:x="4.181cm" svg:y="8.024cm" chart:style-name="ch7">
              <text:p><text:span text:style-name="T1">Skill Distribution Among Participants</text:span></text:p>
            </chart:title>
            <chart:grid chart:style-name="ch8" chart:class="major"/>
          </chart:axis>
          <chart:series chart:style-name="ch9" chart:values-cell-range-address="Tabelle1.B19:Tabelle1.I19" chart:label-cell-address="Tabelle1.A19:Tabelle1.A19" chart:class="chart:bar">
            <chart:data-point chart:repeated="8"/>
          </chart:series>
          <chart:series chart:style-name="ch10" chart:values-cell-range-address="Tabelle1.B20:Tabelle1.I20" chart:label-cell-address="Tabelle1.A20:Tabelle1.A20" chart:class="chart:bar">
            <chart:data-point chart:repeated="8"/>
          </chart:series>
          <chart:series chart:style-name="ch11" chart:values-cell-range-address="Tabelle1.B21:Tabelle1.I21" chart:label-cell-address="Tabelle1.A21:Tabelle1.A21" chart:class="chart:bar">
            <chart:data-point chart:repeated="8"/>
          </chart:series>
          <chart:series chart:style-name="ch12" chart:values-cell-range-address="Tabelle1.B22:Tabelle1.I22" chart:label-cell-address="Tabelle1.A22:Tabelle1.A22" chart:class="chart:bar">
            <chart:data-point chart:repeated="8"/>
          </chart:series>
          <chart:series chart:style-name="ch13" chart:values-cell-range-address="Tabelle1.B23:Tabelle1.I23" chart:label-cell-address="Tabelle1.A23:Tabelle1.A23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ker</text:p>
                <draw:g>
                  <svg:desc>Tabelle1.B18:Tabelle1.I18</svg:desc>
                </draw:g>
              </table:table-cell>
              <table:table-cell office:value-type="string">
                <text:p>Compose</text:p>
              </table:table-cell>
              <table:table-cell office:value-type="string">
                <text:p>K8s (Use)</text:p>
              </table:table-cell>
              <table:table-cell office:value-type="string">
                <text:p>K8s (SysAdm)</text:p>
              </table:table-cell>
              <table:table-cell office:value-type="string">
                <text:p>Git</text:p>
              </table:table-cell>
              <table:table-cell office:value-type="string">
                <text:p>CI</text:p>
              </table:table-cell>
              <table:table-cell office:value-type="string">
                <text:p>CD</text:p>
              </table:table-cell>
              <table:table-cell office:value-type="string">
                <text:p>GitOps</text:p>
              </table:table-cell>
            </table:table-row>
          </table:table-header-rows>
          <table:table-rows>
            <table:table-row>
              <table:table-cell office:value-type="string">
                <text:p>Never heard of it</text:p>
                <draw:g>
                  <svg:desc>Tabelle1.A19:Tabelle1.A19</svg:desc>
                </draw:g>
              </table:table-cell>
              <table:table-cell office:value-type="float" office:value="0">
                <text:p>0</text:p>
                <draw:g>
                  <svg:desc>Tabelle1.B19:Tabelle1.I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ware, but no XP</text:p>
                <draw:g>
                  <svg:desc>Tabelle1.A20:Tabelle1.A20</svg:desc>
                </draw:g>
              </table:table-cell>
              <table:table-cell office:value-type="float" office:value="1">
                <text:p>1</text:p>
                <draw:g>
                  <svg:desc>Tabelle1.B20:Tabelle1.I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rely use it</text:p>
                <draw:g>
                  <svg:desc>Tabelle1.A21:Tabelle1.A21</svg:desc>
                </draw:g>
              </table:table-cell>
              <table:table-cell office:value-type="float" office:value="2">
                <text:p>2</text:p>
                <draw:g>
                  <svg:desc>Tabelle1.B21:Tabelle1.I2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gular user</text:p>
                <draw:g>
                  <svg:desc>Tabelle1.A22:Tabelle1.A22</svg:desc>
                </draw:g>
              </table:table-cell>
              <table:table-cell office:value-type="float" office:value="5">
                <text:p>5</text:p>
                <draw:g>
                  <svg:desc>Tabelle1.B22:Tabelle1.I2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ensive level</text:p>
                <draw:g>
                  <svg:desc>Tabelle1.A23:Tabelle1.A23</svg:desc>
                </draw:g>
              </table:table-cell>
              <table:table-cell office:value-type="float" office:value="3">
                <text:p>3</text:p>
                <draw:g>
                  <svg:desc>Tabelle1.B23:Tabelle1.I2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 style:data-style-name="N100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3.062cm" svg:height="12.981cm" xlink:href=".." xlink:type="simple" chart:class="chart:bar" chart:style-name="ch1">
        <chart:legend chart:legend-position="end" svg:x="19.63cm" svg:y="5.195cm" style:legend-expansion="high" chart:style-name="ch2"/>
        <chart:plot-area chart:style-name="ch3" svg:x="1.472cm" svg:y="0.259cm" svg:width="17.697cm" svg:height="11.482cm">
          <chart:coordinate-region svg:x="3.921cm" svg:y="0.907cm" svg:width="14.759cm" svg:height="10.834cm"/>
          <chart:axis chart:dimension="x" chart:name="primary-x" chart:style-name="ch4" chartooo:axis-type="auto">
            <chartooo:date-scale/>
            <chart:title svg:x="0.451cm" svg:y="7.151cm" chart:style-name="ch5">
              <text:p><text:span text:style-name="T1">Technical Skills</text:span></text:p>
            </chart:title>
            <chart:categories table:cell-range-address="Tabelle1.B18:Tabelle1.I18"/>
          </chart:axis>
          <chart:axis chart:dimension="y" chart:name="primary-y" chart:style-name="ch6">
            <chart:title svg:x="7.21cm" svg:y="12cm" chart:style-name="ch7">
              <text:p><text:span text:style-name="T1">Experience Distribution Among Participants</text:span></text:p>
            </chart:title>
            <chart:grid chart:style-name="ch8" chart:class="major"/>
          </chart:axis>
          <chart:series chart:style-name="ch9" chart:values-cell-range-address="Tabelle1.B19:Tabelle1.I19" chart:label-cell-address="Tabelle1.A19:Tabelle1.A19" chart:class="chart:bar">
            <chart:data-point chart:repeated="8"/>
          </chart:series>
          <chart:series chart:style-name="ch10" chart:values-cell-range-address="Tabelle1.B20:Tabelle1.I20" chart:label-cell-address="Tabelle1.A20:Tabelle1.A20" chart:class="chart:bar">
            <chart:data-point chart:repeated="8"/>
          </chart:series>
          <chart:series chart:style-name="ch11" chart:values-cell-range-address="Tabelle1.B21:Tabelle1.I21" chart:label-cell-address="Tabelle1.A21:Tabelle1.A21" chart:class="chart:bar">
            <chart:data-point chart:repeated="8"/>
          </chart:series>
          <chart:series chart:style-name="ch12" chart:values-cell-range-address="Tabelle1.B22:Tabelle1.I22" chart:label-cell-address="Tabelle1.A22:Tabelle1.A22" chart:class="chart:bar">
            <chart:data-point chart:repeated="8"/>
          </chart:series>
          <chart:series chart:style-name="ch13" chart:values-cell-range-address="Tabelle1.B23:Tabelle1.I23" chart:label-cell-address="Tabelle1.A23:Tabelle1.A23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ker</text:p>
                <draw:g>
                  <svg:desc>Tabelle1.B18:Tabelle1.I18</svg:desc>
                </draw:g>
              </table:table-cell>
              <table:table-cell office:value-type="string">
                <text:p>Compose</text:p>
              </table:table-cell>
              <table:table-cell office:value-type="string">
                <text:p>K8s (Use)</text:p>
              </table:table-cell>
              <table:table-cell office:value-type="string">
                <text:p>K8s (SysAdm)</text:p>
              </table:table-cell>
              <table:table-cell office:value-type="string">
                <text:p>Git</text:p>
              </table:table-cell>
              <table:table-cell office:value-type="string">
                <text:p>CI</text:p>
              </table:table-cell>
              <table:table-cell office:value-type="string">
                <text:p>CD</text:p>
              </table:table-cell>
              <table:table-cell office:value-type="string">
                <text:p>GitOps</text:p>
              </table:table-cell>
            </table:table-row>
          </table:table-header-rows>
          <table:table-rows>
            <table:table-row>
              <table:table-cell office:value-type="string">
                <text:p>Never heard of it</text:p>
                <draw:g>
                  <svg:desc>Tabelle1.A19:Tabelle1.A19</svg:desc>
                </draw:g>
              </table:table-cell>
              <table:table-cell office:value-type="float" office:value="0">
                <text:p>0</text:p>
                <draw:g>
                  <svg:desc>Tabelle1.B19:Tabelle1.I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ware, but no XP</text:p>
                <draw:g>
                  <svg:desc>Tabelle1.A20:Tabelle1.A20</svg:desc>
                </draw:g>
              </table:table-cell>
              <table:table-cell office:value-type="float" office:value="1">
                <text:p>1</text:p>
                <draw:g>
                  <svg:desc>Tabelle1.B20:Tabelle1.I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rely use it</text:p>
                <draw:g>
                  <svg:desc>Tabelle1.A21:Tabelle1.A21</svg:desc>
                </draw:g>
              </table:table-cell>
              <table:table-cell office:value-type="float" office:value="2">
                <text:p>2</text:p>
                <draw:g>
                  <svg:desc>Tabelle1.B21:Tabelle1.I2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gular user</text:p>
                <draw:g>
                  <svg:desc>Tabelle1.A22:Tabelle1.A22</svg:desc>
                </draw:g>
              </table:table-cell>
              <table:table-cell office:value-type="float" office:value="5">
                <text:p>5</text:p>
                <draw:g>
                  <svg:desc>Tabelle1.B22:Tabelle1.I2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ensive level</text:p>
                <draw:g>
                  <svg:desc>Tabelle1.A23:Tabelle1.A23</svg:desc>
                </draw:g>
              </table:table-cell>
              <table:table-cell office:value-type="float" office:value="3">
                <text:p>3</text:p>
                <draw:g>
                  <svg:desc>Tabelle1.B23:Tabelle1.I2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